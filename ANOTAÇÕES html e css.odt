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" style:parent-style-name="Fonteparág.padrão" style:family="text">
      <style:text-properties style:font-name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6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" style:parent-style-name="Fonteparág.padrão" style:family="text">
      <style:text-properties style:font-name="Arial" style:font-name-asian="Arial" style:font-name-complex="Arial" fo:font-size="16pt" style:font-size-asian="16pt" style:font-size-complex="16pt" fo:language="pt" fo:country="BR"/>
    </style:style>
    <style:style style:name="T2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3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4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P5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9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fo:language="pt" fo:country="BR"/>
    </style:style>
    <style:style style:name="P60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6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7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7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7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8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8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6" style:parent-style-name="Standard" style:family="paragraph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7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8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9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9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0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4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120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1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2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2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3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3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2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4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5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5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5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5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6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6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6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6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6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7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7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4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8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89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0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1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2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3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4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5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7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8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2" style:parent-style-name="Fonteparág.padrão" style:family="text">
      <style:text-properties style:font-name="Arial" style:font-name-asian="Arial" style:font-name-complex="Arial" fo:color="#990099" fo:font-size="18pt" style:font-size-asian="18pt" style:font-size-complex="18pt" fo:language="pt" fo:country="BR"/>
    </style:style>
    <style:style style:name="T2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0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6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5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5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6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6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8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6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27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7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7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0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2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4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5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88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9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2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3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9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6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7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8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9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3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01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9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33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31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3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334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5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6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7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38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9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40" style:parent-style-name="Standard" style:family="paragraph">
      <style:paragraph-properties fo:background-color="#FFFFFF"/>
    </style:style>
    <style:style style:name="T341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42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43" style:parent-style-name="Fonteparág.padrão" style:family="text">
      <style:text-properties style:font-name="Arial" style:font-name-asian="Arial" style:font-name-complex="Arial" fo:color="#0000FF" fo:font-size="13pt" style:font-size-asian="13pt" style:font-size-complex="13pt" fo:background-color="#FFFFFF" fo:language="pt" fo:country="BR"/>
    </style:style>
    <style:style style:name="P344" style:parent-style-name="Standard" style:family="paragraph">
      <style:paragraph-properties fo:background-color="#FFFFFF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4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4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4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9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0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1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2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3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5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6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7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8" style:parent-style-name="Standard" style:list-style-name="LFO2" style:family="paragraph"/>
    <style:style style:name="T35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0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6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4" style:parent-style-name="Standard" style:family="paragraph">
      <style:text-properties style:font-name="Arial" style:font-name-complex="Arial" fo:language="pt" fo:country="BR"/>
    </style:style>
    <style:style style:name="P37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7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2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3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4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8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38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1" style:parent-style-name="Standard" style:family="paragraph">
      <style:paragraph-properties fo:text-indent="0.4902in"/>
    </style:style>
    <style:style style:name="T39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4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39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7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8" style:parent-style-name="Standard" style:family="paragraph">
      <style:paragraph-properties fo:text-indent="0.4902in"/>
    </style:style>
    <style:style style:name="T39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01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03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5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40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2" style:parent-style-name="Fonteparág.padrão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41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1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8" style:parent-style-name="Fonteparág.padrão" style:family="text">
      <style:text-properties style:font-name="Arial" style:font-name-asian="Arial" style:font-name-complex="Arial" fo:color="#CC0099" fo:font-size="18pt" style:font-size-asian="18pt" style:font-size-complex="18pt" fo:language="pt" fo:country="BR"/>
    </style:style>
    <style:style style:name="T4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1" style:parent-style-name="Fonteparág.padrão" style:family="text">
      <style:text-properties style:font-name="Arial" style:font-name-asian="Arial" style:font-name-complex="Arial" fo:color="#038F24" fo:font-size="18pt" style:font-size-asian="18pt" style:font-size-complex="18pt" fo:language="pt" fo:country="BR"/>
    </style:style>
    <style:style style:name="T42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42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4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7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9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3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31" style:parent-style-name="Fonteparág.padrão" style:family="text">
      <style:text-properties style:font-name="Arial" style:font-name-asian="Arial" style:font-name-complex="Arial" fo:color="#4472C4" fo:font-size="18pt" style:font-size-asian="18pt" style:font-size-complex="18pt" fo:language="pt" fo:country="BR"/>
    </style:style>
    <style:style style:name="T4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33" style:parent-style-name="Hyperlink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34" style:parent-style-name="Standard" style:family="paragraph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5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language="pt" fo:country="BR"/>
    </style:style>
    <style:style style:name="T437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pt" fo:country="BR"/>
    </style:style>
    <style:style style:name="T439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40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1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2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3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4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4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5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57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P458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59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6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1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6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3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6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5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46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7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46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7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P474" style:parent-style-name="Standard" style:family="paragraph">
      <style:text-properties style:font-name="Arial" style:font-name-complex="Arial"/>
    </style:style>
    <style:style style:name="T47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es" fo:country="AR"/>
    </style:style>
    <style:style style:name="T476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es" fo:country="AR"/>
    </style:style>
    <style:style style:name="T47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T4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T47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480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481" style:parent-style-name="Standard" style:family="paragraph">
      <style:text-properties style:font-name="Arial" style:font-name-complex="Arial"/>
    </style:style>
    <style:style style:name="P482" style:parent-style-name="Standard" style:family="paragraph">
      <style:paragraph-properties fo:text-align="center"/>
    </style:style>
    <style:style style:name="T4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84" style:parent-style-name="Standard" style:family="paragraph">
      <style:text-properties style:font-name="Arial" style:font-name-complex="Arial"/>
    </style:style>
    <style:style style:name="T48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6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2" style:parent-style-name="Fonteparág.padrão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4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4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9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6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9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8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49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00" style:parent-style-name="Standard" style:family="paragraph">
      <style:text-properties style:font-name="Arial" style:font-name-complex="Arial"/>
    </style:style>
    <style:style style:name="T50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2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0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8" style:parent-style-name="Fonteparág.padrão" style:family="text">
      <style:text-properties style:font-name="Arial" style:font-name-asian="Arial" style:font-name-complex="Arial" fo:color="#00B0F0" fo:font-size="18pt" style:font-size-asian="18pt" style:font-size-complex="18pt" fo:language="pt" fo:country="BR"/>
    </style:style>
    <style:style style:name="T50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0" style:parent-style-name="Fonteparág.padrão" style:family="text">
      <style:text-properties style:font-name="Arial" style:font-name-asian="Arial" style:font-name-complex="Arial" fo:color="#00C89B" fo:font-size="18pt" style:font-size-asian="18pt" style:font-size-complex="18pt" fo:language="pt" fo:country="BR"/>
    </style:style>
    <style:style style:name="T51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2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51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14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51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6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1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2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24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9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30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3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2" style:parent-style-name="DefaultParagraphFont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53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4" style:parent-style-name="DefaultParagraphFont" style:family="text">
      <style:text-properties style:font-name="Arial" style:font-name-asian="Arial" style:font-name-complex="Arial" fo:color="#FF3200" fo:font-size="18pt" style:font-size-asian="18pt" style:font-size-complex="18pt" fo:language="pt" fo:country="BR"/>
    </style:style>
    <style:style style:name="T5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3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38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39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4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3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44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6" style:parent-style-name="DefaultParagraphFont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5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8" style:parent-style-name="DefaultParagraphFont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5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5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5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56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3" style:parent-style-name="Standard" style:family="paragraph">
      <style:text-properties style:font-name="Arial" style:font-name-complex="Arial"/>
    </style:style>
    <style:style style:name="T56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6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7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7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8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7" style:parent-style-name="DefaultParagraphFont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588" style:parent-style-name="DefaultParagraphFont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8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9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60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60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2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603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6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60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0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700" style:parent-style-name="Standard" style:family="paragraph">
      <style:text-properties style:font-name="Arial" style:font-name-complex="Arial" fo:font-size="13pt" style:font-size-asian="13pt" style:font-size-complex="13pt"/>
    </style:style>
    <style:style style:name="P701" style:parent-style-name="Standard" style:family="paragraph">
      <style:text-properties style:font-name="Arial" style:font-name-complex="Arial" fo:font-size="13pt" style:font-size-asian="13pt" style:font-size-complex="13pt"/>
    </style:style>
    <style:style style:name="T702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04" style:parent-style-name="Standard" style:family="paragraph">
      <style:text-properties style:font-name="Arial" style:font-name-complex="Arial" fo:font-size="18pt" style:font-size-asian="18pt" style:font-size-complex="18pt"/>
    </style:style>
    <style:style style:name="T705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9" style:parent-style-name="DefaultParagraphFont" style:family="text">
      <style:text-properties style:font-name="Open Sans Light" style:font-name-complex="Open Sans Light" fo:font-size="18pt" style:font-size-asian="18pt" style:font-size-complex="18pt"/>
    </style:style>
    <style:style style:name="T7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2" style:parent-style-name="DefaultParagraphFont" style:family="text">
      <style:text-properties style:font-name="Open Sans" style:font-name-complex="Open Sans" fo:font-size="18pt" style:font-size-asian="18pt" style:font-size-complex="18pt"/>
    </style:style>
    <style:style style:name="T7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5" style:parent-style-name="DefaultParagraphFont" style:family="text">
      <style:text-properties style:font-name="Open Sans SemiBold" style:font-name-complex="Open Sans SemiBold" fo:font-size="18pt" style:font-size-asian="18pt" style:font-size-complex="18pt"/>
    </style:style>
    <style:style style:name="T7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8" style:parent-style-name="DefaultParagraphFont" style:family="text">
      <style:text-properties style:font-name="Open Sans bold" style:font-name-complex="Arial" fo:font-size="18pt" style:font-size-asian="18pt" style:font-size-complex="18pt"/>
    </style:style>
    <style:style style:name="P719" style:parent-style-name="Standard" style:family="paragraph">
      <style:text-properties style:font-name="Open Sans bold" style:font-name-complex="Arial" fo:font-size="18pt" style:font-size-asian="18pt" style:font-size-complex="18pt"/>
    </style:style>
    <style:style style:name="T720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2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30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3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3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3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3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77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7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7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80" style:parent-style-name="Standard" style:family="paragraph">
      <style:paragraph-properties fo:margin-left="0.25in">
        <style:tab-stops/>
      </style:paragraph-properties>
    </style:style>
    <style:style style:name="T78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87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88" style:parent-style-name="Standard" style:family="paragraph">
      <style:paragraph-properties fo:margin-left="0.25in">
        <style:tab-stops/>
      </style:paragraph-properties>
    </style:style>
    <style:style style:name="T78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96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97" style:parent-style-name="Standard" style:family="paragraph">
      <style:paragraph-properties fo:margin-left="0.25in">
        <style:tab-stops/>
      </style:paragraph-properties>
    </style:style>
    <style:style style:name="T79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01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02" style:parent-style-name="Standard" style:family="paragraph">
      <style:paragraph-properties fo:margin-left="0.25in">
        <style:tab-stops/>
      </style:paragraph-properties>
    </style:style>
    <style:style style:name="T80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80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en" fo:country="US"/>
    </style:style>
    <style:style style:name="T805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en" fo:country="US"/>
    </style:style>
    <style:style style:name="P806" style:parent-style-name="Standard" style:family="paragraph">
      <style:paragraph-properties fo:margin-left="0.25in">
        <style:tab-stops/>
      </style:paragraph-properties>
    </style:style>
    <style:style style:name="P807" style:parent-style-name="Standard" style:family="paragraph">
      <style:paragraph-properties fo:margin-left="0.25in">
        <style:tab-stops/>
      </style:paragraph-properties>
    </style:style>
    <style:style style:name="T808" style:parent-style-name="DefaultParagraphFont" style:family="text">
      <style:text-properties style:font-name="Arial" style:font-name-complex="Arial" fo:color="#FF0000" fo:font-size="15pt" style:font-size-asian="15pt" style:font-size-complex="15pt"/>
    </style:style>
    <style:style style:name="T809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0" style:parent-style-name="DefaultParagraphFont" style:family="text">
      <style:text-properties style:font-name="Arial" style:font-name-complex="Arial" fo:color="#ED7D31" fo:font-size="15pt" style:font-size-asian="15pt" style:font-size-complex="15pt"/>
    </style:style>
    <style:style style:name="T811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2" style:parent-style-name="DefaultParagraphFont" style:family="text">
      <style:text-properties style:font-name="Arial" style:font-name-complex="Arial" fo:color="#FFC000" fo:font-size="15pt" style:font-size-asian="15pt" style:font-size-complex="15pt"/>
    </style:style>
    <style:style style:name="T813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4" style:parent-style-name="DefaultParagraphFont" style:family="text">
      <style:text-properties style:font-name="Arial" style:font-name-complex="Arial" fo:color="#92D050" fo:font-size="15pt" style:font-size-asian="15pt" style:font-size-complex="15pt"/>
    </style:style>
    <style:style style:name="P81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9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20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21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82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2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2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2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2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3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31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32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83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3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3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background-color="#FFFF00" fo:language="pt" fo:country="BR"/>
    </style:style>
    <style:style style:name="T83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4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4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4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7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8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8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8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8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8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9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9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9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98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9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90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0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0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0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10" style:parent-style-name="Standard" style:family="paragraph">
      <style:text-properties fo:language="pt" fo:country="BR"/>
    </style:style>
    <style:style style:family="graphic" style:name="a12" style:parent-style-name="Graphics">
      <style:graphic-properties fo:border="0.01042in none" fo:background-color="transparent" fo:clip="rect(0in, 0in, 0in, -0.00698in)"/>
    </style:style>
    <style:style style:family="graphic" style:name="a0" style:parent-style-name="Graphics">
      <style:graphic-properties fo:border="0.01042in none" fo:background-color="transparent" style:mirror="horizontal"/>
    </style:style>
    <style:style style:family="graphic" style:name="a13" style:parent-style-name="Graphics">
      <style:graphic-properties fo:border="0.01042in none" fo:background-color="transparent" fo:clip="rect(0in, 0in, 0in, -0.00698in)"/>
    </style:style>
    <style:style style:family="graphic" style:name="a1" style:parent-style-name="Graphics">
      <style:graphic-properties fo:border="0.01042in none" fo:background-color="transparent" style:mirror="horizontal"/>
    </style:style>
    <style:style style:family="graphic" style:name="a2" style:parent-style-name="Graphics">
      <style:graphic-properties fo:border="0.01042in none" fo:background-color="transparent" style:mirror="horizontal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mirror="horizontal"/>
    </style:style>
    <style:style style:family="graphic" style:name="a5" style:parent-style-name="Graphics">
      <style:graphic-properties fo:border="0.01042in none" fo:background-color="transparent" style:mirror="horizontal"/>
    </style:style>
    <style:style style:family="graphic" style:name="a6" style:parent-style-name="Graphics">
      <style:graphic-properties fo:border="0.01042in none" fo:background-color="transparent" style:mirror="horizontal"/>
    </style:style>
    <style:style style:family="graphic" style:name="a7" style:parent-style-name="Graphics">
      <style:graphic-properties fo:border="0.01042in none" fo:background-color="transparent" style:mirror="horizontal"/>
    </style:style>
    <style:style style:family="graphic" style:name="a8" style:parent-style-name="Graphics">
      <style:graphic-properties fo:border="0.01042in none" fo:background-color="transparent" style:mirror="horizontal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mirror="horizontal"/>
    </style:style>
    <style:style style:family="graphic" style:name="a11" style:parent-style-name="Graphics">
      <style:graphic-properties fo:border="0.01042in none" fo:background-color="transparent" style:mirror="horizontal"/>
    </style:style>
  </office:automatic-styles>
  <office:body>
    <office:text text:use-soft-page-breaks="true">
      <text:p text:style-name="P1"><text:span text:style-name="T2">●</text:span><text:span text:style-name="T3">ANOTAÇÕES</text:span><text:span text:style-name="T4">●</text:span></text:p>
      <text:p text:style-name="P5"/>
      <text:p text:style-name="P6">●LINKS html</text:p>
      <text:p text:style-name="P7"/>
      <text:p text:style-name="Standard"><text:span text:style-name="T8"><text:tab/></text:span><text:span text:style-name="T9">-</text:span><text:span text:style-name="T10">Os links são definidos por<text:s/></text:span><text:span text:style-name="T11">&lt;a&gt;&lt;/a&gt;</text:span></text:p>
      <text:p text:style-name="Standard"><text:span text:style-name="T12"><text:tab/></text:span><text:span text:style-name="T13">-</text:span><text:span text:style-name="T14">O destino é definido por "</text:span><text:span text:style-name="T15">href</text:span><text:span text:style-name="T16">"</text:span></text:p>
      <text:p text:style-name="Standard"><text:span text:style-name="T17"><text:tab/></text:span><text:span text:style-name="T18">-</text:span><text:span text:style-name="T19">O que é escrito após isso,<text:s/></text:span><text:span text:style-name="T20">é o</text:span><text:span text:style-name="T21"><text:s/>que estará escrito no link</text:span></text:p>
      <text:p text:style-name="Standard"><text:span text:style-name="T22"><text:tab/>-</text:span><text:span text:style-name="T23">target=""</text:span><text:span text:style-name="T24"><text:s/>para definir se abrirá uma nova aba ou continuará na mesma.<text:s/></text:span><text:span text:style-name="T25">_blank</text:span><text:span text:style-name="T26"><text:s/>abrirá outra aba,<text:s/></text:span><text:span text:style-name="T27">_self</text:span><text:span text:style-name="T28">, continuará na mesma</text:span></text:p>
      <text:p text:style-name="P29"><text:tab/></text:p>
      <text:p text:style-name="P30"><text:tab/>EX:</text:p>
      <text:p text:style-name="Standard"><text:span text:style-name="T31"><text:tab/>&lt;a&gt; href="</text:span><text:a xlink:href="http://www.youtube.com/" office:target-frame-name="_top" xlink:show="replace"><text:span text:style-name="T32">www.youtube.com</text:span></text:a><text:span text:style-name="T33">"&gt;Clique aqui&lt;/a&gt;</text:span></text:p>
      <text:p text:style-name="P34"/>
      <text:p text:style-name="Standard"><text:span text:style-name="T35">●Links para download</text:span></text:p>
      <text:p text:style-name="P36"/>
      <text:p text:style-name="Standard"><text:span text:style-name="T37"><text:tab/>-</text:span><text:span text:style-name="T38">No href coloque o seu arquivo que você já tem que ter colocado em uma pasta. EX:<text:s/></text:span><text:span text:style-name="T39">href=”./livro/meulivro.png”</text:span></text:p>
      <text:p text:style-name="P40"/>
      <text:p text:style-name="Standard"><text:span text:style-name="T41"><text:tab/></text:span><text:span text:style-name="T42">-</text:span><text:span text:style-name="T43">Adicione um parámetro<text:s/></text:span><text:span text:style-name="T44">download</text:span><text:span text:style-name="T45"><text:s/>e coloque o nome do arquivo. EX: &lt;a download=”meulivro.png”&gt;</text:span></text:p>
      <text:p text:style-name="P46"/>
      <text:p text:style-name="Standard"><text:span text:style-name="T47"><text:tab/></text:span><text:span text:style-name="T48">-</text:span><text:span text:style-name="T49">Coloque um outro parámetro<text:s/></text:span><text:span text:style-name="T50">type</text:span><text:span text:style-name="T51"><text:s/>e coloque o tipo dependendo do arquivo, você pode verificar o tipo nesse site:<text:s/></text:span><text:a xlink:href="https://www.iana.org/assignments/media-types/media-types.xhtml" office:target-frame-name="_top" xlink:show="replace"><text:span text:style-name="T52">htt</text:span><text:bookmark-start text:name="_Hlt77689134"/><text:bookmark-start text:name="_Hlt77689135"/><text:span text:style-name="T53">p</text:span><text:bookmark-end text:name="_Hlt77689134"/><text:bookmark-end text:name="_Hlt77689135"/><text:span text:style-name="T54">s://www.iana.org/assignments/media-types/media-types.xhtml</text:span></text:a><text:span text:style-name="T55"><text:s/></text:span><text:span text:style-name="T56">EX: &lt;a type=”application/pdf”&gt;</text:span></text:p>
      <text:p text:style-name="Standard"><text:span text:style-name="T57"><text:tab/></text:span></text:p>
      <text:p text:style-name="P58"/>
      <text:p text:style-name="P59"/>
      <text:p text:style-name="P60">●IMAGENS html</text:p>
      <text:p text:style-name="P61"/>
      <text:p text:style-name="Standard"><text:span text:style-name="T62"><text:tab/></text:span><text:span text:style-name="T63">-</text:span><text:span text:style-name="T64">As imagens são definidas com a tag<text:s/></text:span><text:span text:style-name="T65">&lt;img&gt;</text:span></text:p>
      <text:p text:style-name="Standard"><text:span text:style-name="T66"><text:tab/></text:span><text:span text:style-name="T67">-</text:span><text:span text:style-name="T68">src</text:span><text:span text:style-name="T69">, é onde<text:s/></text:span><text:span text:style-name="T70">colocamos exatamente como a imagem está salva, se tiver em uma outra pasta, coloque o nome da pasta também</text:span></text:p>
      <text:soft-page-break/>
      <text:p text:style-name="Standard"><text:span text:style-name="T71"><text:tab/></text:span><text:span text:style-name="T72">-</text:span><text:span text:style-name="T73">&lt;figcaption&gt;&lt;/figcaption&gt;</text:span><text:span text:style-name="T74"><text:s/>para colocar a legenda da foto</text:span><text:span text:style-name="T75"><text:tab/></text:span></text:p>
      <text:p text:style-name="Standard"><text:span text:style-name="T76"><text:tab/>-</text:span><text:span text:style-name="T77">coloca-se no<text:s/></text:span><text:span text:style-name="T78">alt</text:span><text:span text:style-name="T79">, a mensagem que aparecerá caso a imagem não seja exibida</text:span></text:p>
      <text:p text:style-name="Standard"><text:span text:style-name="T80"><text:tab/></text:span><text:span text:style-name="T81">-</text:span><text:span text:style-name="T82">sempre que<text:s/></text:span><text:span text:style-name="T83">quiser uma legenda em uma imagem,</text:span></text:p>
      <text:p text:style-name="Standard"><text:span text:style-name="T84">coloque-a entre a tag<text:s/></text:span><text:span text:style-name="T85">&lt;figure&gt;&lt;/figure&gt;</text:span></text:p>
      <text:p text:style-name="P86"/>
      <text:p text:style-name="P87">●Títulos, parágrafos e quebras de linha</text:p>
      <text:p text:style-name="P88"/>
      <text:p text:style-name="Standard"><text:span text:style-name="T89"><text:tab/></text:span><text:span text:style-name="T90">-</text:span><text:span text:style-name="T91">Os títulos, vão de<text:s/></text:span><text:span text:style-name="T92">h1 até h6</text:span><text:span text:style-name="T93">, o h1 é o maior e o h6 o menor</text:span></text:p>
      <text:p text:style-name="Standard"><text:span text:style-name="T94"><text:tab/></text:span><text:span text:style-name="T95">-</text:span><text:span text:style-name="T96">&lt;hgroup&gt;&lt;/hroup&gt;</text:span><text:span text:style-name="T97"><text:s/>agrupa o h1, h2, h3 e etc.</text:span></text:p>
      <text:p text:style-name="Standard"><text:span text:style-name="T98"><text:tab/></text:span><text:span text:style-name="T99">-</text:span><text:span text:style-name="T100">&lt;header&gt;&lt;/header&gt;</text:span><text:span text:style-name="T101"><text:s/>define um cabeçalho</text:span></text:p>
      <text:p text:style-name="Standard"><text:span text:style-name="T102"><text:tab/>-</text:span><text:span text:style-name="T103">Os parágrafos são definidos pela tag<text:s/></text:span><text:span text:style-name="T104">&lt;p&gt; &lt;/p&gt;</text:span></text:p>
      <text:p text:style-name="Standard"><text:span text:style-name="T105"><text:tab/>-</text:span><text:span text:style-name="T106">E a quebra de linha é um elemento vazio, não tem fechamento e nem nada dentro, é definida por<text:s/></text:span><text:span text:style-name="T107">&lt;br&gt;</text:span><text:span text:style-name="T108">, a cada &lt;br&gt; é uma quebra.</text:span></text:p>
      <text:p text:style-name="Standard"><text:span text:style-name="T109"><text:tab/></text:span><text:span text:style-name="T110">-</text:span><text:span text:style-name="T111">A tag<text:s/></text:span><text:span text:style-name="T112">&lt;hr&gt;</text:span><text:span text:style-name="T113"><text:s/>adiciona uma linha<text:s/></text:span><text:span text:style-name="T114">horizontal para separar algo no seu site, é uma tag vazia</text:span></text:p>
      <text:p text:style-name="Standard"><text:span text:style-name="T115"><text:tab/></text:span><text:span text:style-name="T116">-</text:span><text:span text:style-name="T117">Existe a tag<text:s/></text:span><text:span text:style-name="T118">&lt;pre&gt;&lt;/pre&gt;<text:s/></text:span><text:span text:style-name="T119">que define que o que está escrito no código, é um texto pré-formatado, ou seja, o site irá considerar espaços e quebras de linha sem tags adicionais</text:span></text:p>
      <text:p text:style-name="P120"/>
      <text:p text:style-name="P121"/>
      <text:p text:style-name="P122">●ELEMENTOS</text:p>
      <text:p text:style-name="P123"><text:tab/>-Um elemento é tudo entre a tag inicial e final</text:p>
      <text:p text:style-name="P124">Exemplos de elementos:</text:p>
      <text:p text:style-name="Standard"><text:span text:style-name="T125"><text:tab/>-</text:span><text:span text:style-name="T126">&lt;nav&gt;&lt;/nav&gt;</text:span><text:span text:style-name="T127"><text:s/>para definir que terá alguns links dentro desta tag, nav de navegation</text:span></text:p>
      <text:p text:style-name="P128"/>
      <text:p text:style-name="P129"/>
      <text:p text:style-name="P130">●ATRIBUTOS</text:p>
      <text:p text:style-name="P131"/>
      <text:p text:style-name="Standard"><text:span text:style-name="T132"><text:tab/></text:span><text:span text:style-name="T133">-</text:span><text:span text:style-name="T134">Atributo fornece uma informação adicional para um<text:s/></text:span><text:soft-page-break/><text:span text:style-name="T135">elemento.</text:span></text:p>
      <text:p text:style-name="Standard"><text:span text:style-name="T136"><text:tab/></text:span><text:span text:style-name="T137">-</text:span><text:span text:style-name="T138">Todo elemento pode ter<text:s/></text:span><text:span text:style-name="T139">atributos.</text:span></text:p>
      <text:p text:style-name="P140"/>
      <text:p text:style-name="P141"/>
      <text:p text:style-name="P142"><text:tab/>EX:</text:p>
      <text:p text:style-name="Standard"><text:span text:style-name="T143"><text:tab/></text:span><text:span text:style-name="T144"><text:tab/>&lt;div<text:s/></text:span><text:span text:style-name="T145">id="amor"</text:span><text:span text:style-name="T146">&gt;Eu amo a minha mãe&lt;/div&gt;</text:span></text:p>
      <text:p text:style-name="P147"><text:tab/></text:p>
      <text:p text:style-name="Standard"><text:span text:style-name="T148"><text:tab/></text:span><text:span text:style-name="T149">-</text:span><text:span text:style-name="T150">Outros atibutos:</text:span></text:p>
      <text:p text:style-name="Standard"><text:span text:style-name="T151"><text:tab/></text:span><text:span text:style-name="T152"><text:tab/>-</text:span><text:span text:style-name="T153">title="lala"</text:span><text:span text:style-name="T154"><text:s/>Para quando passar o mouse por cima disso ele aparecer o texto "lala"</text:span></text:p>
      <text:p text:style-name="Standard"><text:span text:style-name="T155"><text:tab/></text:span><text:span text:style-name="T156"><text:tab/></text:span><text:span text:style-name="T157">-</text:span><text:span text:style-name="T158">font-family:arial;</text:span><text:span text:style-name="T159"><text:s/>para mudar apenas a fonte do texto</text:span></text:p>
      <text:p text:style-name="P160"/>
      <text:p text:style-name="P161"/>
      <text:p text:style-name="Standard"><text:span text:style-name="T162">●</text:span><text:span text:style-name="T163">FORMATAÇÃO</text:span></text:p>
      <text:p text:style-name="P164"/>
      <text:p text:style-name="Standard"><text:span text:style-name="T165"><text:tab/></text:span><text:span text:style-name="T166">-</text:span><text:span text:style-name="T167">&lt;b&gt;&lt;/b&gt;</text:span><text:span text:style-name="T168"><text:s/>tudo fi</text:span><text:span text:style-name="T169">cará em negrito</text:span></text:p>
      <text:p text:style-name="Standard"><text:span text:style-name="T170"><text:tab/></text:span><text:span text:style-name="T171">-</text:span><text:span text:style-name="T172">&lt;i&gt;&lt;/i&gt;</text:span><text:span text:style-name="T173"><text:s/>tudo ficará em itálico</text:span></text:p>
      <text:p text:style-name="Standard"><text:span text:style-name="T174"><text:tab/></text:span><text:span text:style-name="T175">-</text:span><text:span text:style-name="T176">&lt;u&gt;&lt;/u&gt;<text:s/></text:span><text:span text:style-name="T177">tudo ficará com underline</text:span></text:p>
      <text:p text:style-name="Standard"><text:span text:style-name="T178"><text:tab/></text:span><text:span text:style-name="T179">-</text:span><text:span text:style-name="T180">&lt;sub&gt;&lt;/sub&gt;</text:span><text:span text:style-name="T181"><text:s/>ficará para baixo</text:span></text:p>
      <text:p text:style-name="Standard"><text:span text:style-name="T182"><text:tab/></text:span><text:span text:style-name="T183">-</text:span><text:span text:style-name="T184">&lt;sup&gt;&lt;/sup&gt;</text:span><text:span text:style-name="T185"><text:s/>ficará para cima</text:span></text:p>
      <text:p text:style-name="Standard"><text:span text:style-name="T186"><text:tab/></text:span><text:span text:style-name="T187">-</text:span><text:span text:style-name="T188">&lt;wbr&gt;</text:span><text:span text:style-name="T189"><text:s/>- para que algo possa ser "quebrado" quando a janela for diminuida</text:span></text:p>
      <text:p text:style-name="Standard"><text:span text:style-name="T190"><text:tab/></text:span><text:span text:style-name="T191">-</text:span><text:span text:style-name="T192">&amp;shy;</text:span><text:span text:style-name="T193"><text:s/>- para que quando for<text:s/></text:span><text:span text:style-name="T194">"quebrado" coloque um hífen</text:span></text:p>
      <text:p text:style-name="Standard"><text:span text:style-name="T195"><text:tab/></text:span><text:span text:style-name="T196">-</text:span><text:span text:style-name="T197">text-ident: 50px;</text:span><text:span text:style-name="T198"><text:s/>- O espaço que fica no começo da linha como se fosse um parágrafo</text:span></text:p>
      <text:p text:style-name="Standard"><text:span text:style-name="T199"><text:tab/></text:span><text:span text:style-name="T200">­-</text:span><text:span text:style-name="T201">&lt;code&gt;&lt;/code&gt;</text:span><text:span text:style-name="T202"><text:s/>as letras ficam em código</text:span></text:p>
      <text:p text:style-name="Standard"><text:span text:style-name="T203"><text:tab/></text:span><text:span text:style-name="T204">-</text:span><text:span text:style-name="T205">&lt;mark&gt;&lt;/mark&gt;</text:span><text:span text:style-name="T206"><text:s/>ficará marcado em amarelo</text:span></text:p>
      <text:p text:style-name="Standard"><text:span text:style-name="T207"><text:tab/></text:span><text:span text:style-name="T208">-</text:span><text:span text:style-name="T209">&lt;small&gt;&lt;/small&gt;</text:span><text:span text:style-name="T210"><text:s/>ficará pequeno</text:span></text:p>
      <text:p text:style-name="Standard"><text:span text:style-name="T211"><text:tab/>-</text:span><text:span text:style-name="T212">&lt;del&gt;&lt;/del&gt;</text:span><text:span text:style-name="T213"><text:s/></text:span><text:span text:style-name="T214">ficará riscado</text:span></text:p>
      <text:p text:style-name="Standard"><text:span text:style-name="T215"><text:tab/></text:span><text:span text:style-name="T216">-</text:span><text:span text:style-name="T217">&lt;ins&gt;&lt;/ins&gt;</text:span><text:span text:style-name="T218"><text:s/>ficará sublinhado</text:span></text:p>
      <text:p text:style-name="Standard"><text:span text:style-name="T219"><text:tab/></text:span><text:a xlink:href="mailto:-@font-face" office:target-frame-name="_top" xlink:show="replace"><text:span text:style-name="T220">-</text:span></text:a><text:a xlink:href="mailto:-@font-face" office:target-frame-name="_top" xlink:show="replace"><text:span text:style-name="T221">@font-face</text:span></text:a><text:span text:style-name="T222"><text:s/></text:span><text:span text:style-name="T223">fica no css e adiciona uma nova fonte</text:span></text:p>
      <text:p text:style-name="Standard"><text:span text:style-name="T224"><text:tab/></text:span><text:span text:style-name="T225">-</text:span><text:span text:style-name="T226">text-decoration: xxxx</text:span><text:span text:style-name="T227"><text:s/>para mudar a decoração do texto</text:span></text:p>
      <text:p text:style-name="Standard"><text:span text:style-name="T228"><text:tab/></text:span><text:span text:style-name="T229">-</text:span><text:span text:style-name="T230">&lt;em&gt;&lt;/em&gt;</text:span><text:span text:style-name="T231"><text:s/>para deixar o<text:s/></text:span><text:span text:style-name="T232">texto em énfasis (itálico<text:s/></text:span><text:soft-page-break/><text:span text:style-name="T233">semântico</text:span></text:p>
      <text:p text:style-name="P234"/>
      <text:p text:style-name="P235"/>
      <text:p text:style-name="Standard"><text:span text:style-name="T236">●</text:span><text:span text:style-name="T237">ELEMENTOS DE COTAÇÃO E CITAÇÃO</text:span></text:p>
      <text:p text:style-name="Standard"><text:span text:style-name="T238"><text:tab/>-</text:span><text:span text:style-name="T239">&lt;blockquote&gt;&lt;/blockquote&gt;</text:span><text:span text:style-name="T240"><text:s/>É usado para definir uma seção usada de outra fonte. Geralmente os navegadores recuam esses elementos</text:span></text:p>
      <text:p text:style-name="Standard"><text:span text:style-name="T241"><text:tab/></text:span><text:span text:style-name="T242">-</text:span><text:span text:style-name="T243">&lt;q&gt;&lt;/q&gt;</text:span><text:span text:style-name="T244"><text:s/>é usado para citações curtas. Os navegadores g</text:span><text:span text:style-name="T245">eralmente adicionam aspas entre as citações</text:span></text:p>
      <text:p text:style-name="Standard"><text:span text:style-name="T246"><text:tab/></text:span><text:span text:style-name="T247">-</text:span><text:span text:style-name="T248">&lt;abbr&gt;&lt;/abbr&gt;</text:span><text:span text:style-name="T249"><text:s/>É usado para abreviações, normalmente vem acompanhado de um atributo title, para mostrar o significado completo</text:span></text:p>
      <text:p text:style-name="Standard"><text:span text:style-name="T250"><text:tab/></text:span><text:span text:style-name="T251">-</text:span><text:span text:style-name="T252">&lt;address&gt;&lt;/address&gt;</text:span><text:span text:style-name="T253"><text:s/>É usado para endereços, seja celular, residencial,<text:s/></text:span><text:span text:style-name="T254">email, país, nome, etc. Geralmente é em itálico e sempre há uma quebra de linha no começo e fim</text:span></text:p>
      <text:p text:style-name="Standard"><text:span text:style-name="T255"><text:tab/></text:span><text:span text:style-name="T256">-</text:span><text:span text:style-name="T257">&lt;cite&gt;&lt;/cite&gt;</text:span><text:span text:style-name="T258"><text:s/>É usado para definir o título de um filme, série, obra, escultura, pintura e etc. Geralmente fica em itálico. Nome de pessoa não entra nesse elm</text:span><text:span text:style-name="T259">ento</text:span></text:p>
      <text:p text:style-name="Standard"><text:span text:style-name="T260"><text:tab/></text:span><text:span text:style-name="T261">-</text:span><text:span text:style-name="T262">&lt;bdo&gt;&lt;/bdo&gt;</text:span><text:span text:style-name="T263"><text:s/>É usado para mudar a direção do texto. EX:</text:span></text:p>
      <text:p text:style-name="Standard"><text:span text:style-name="T264"><text:tab/></text:span><text:span text:style-name="T265">&lt;bdo dir="rtl"&gt;</text:span><text:span text:style-name="T266">Está escrito da direita para a esquerda&lt;/bdo&gt;</text:span></text:p>
      <text:p text:style-name="P267"/>
      <text:p text:style-name="Standard"><text:span text:style-name="T268">●</text:span><text:span text:style-name="T269">LISTAS HTML:</text:span></text:p>
      <text:p text:style-name="P270"/>
      <text:p text:style-name="Standard"><text:span text:style-name="T271"><text:tab/></text:span><text:span text:style-name="T272">-</text:span><text:span text:style-name="T273">&lt;ol&gt;&lt;/ol&gt;</text:span><text:span text:style-name="T274"><text:s/>lista ordenada, para mudar o tipo de ordem, use o atributo<text:s/></text:span><text:span text:style-name="T275">type=""</text:span></text:p>
      <text:p text:style-name="Standard"><text:span text:style-name="T276"><text:tab/></text:span><text:span text:style-name="T277">-</text:span><text:span text:style-name="T278">&lt;ul&gt;&lt;/ul&gt;</text:span><text:span text:style-name="T279"><text:s/>lista não<text:s/></text:span><text:span text:style-name="T280">ordenada, para mudar o tipo, use o atributo<text:s/></text:span><text:span text:style-name="T281">type=""</text:span></text:p>
      <text:p text:style-name="Standard"><text:span text:style-name="T282"><text:tab/></text:span><text:span text:style-name="T283">-</text:span><text:span text:style-name="T284">&lt;li&gt;&lt;/li&gt;</text:span><text:span text:style-name="T285"><text:s/>para colocar um item na lista</text:span></text:p>
      <text:p text:style-name="Standard"><text:span text:style-name="T286"><text:tab/>-</text:span><text:span text:style-name="T287">&lt;dl&gt;&lt;/dl&gt;</text:span><text:span text:style-name="T288"><text:s/>para criar uma lista com descrição</text:span></text:p>
      <text:p text:style-name="Standard"><text:span text:style-name="T289"><text:tab/></text:span><text:span text:style-name="T290">-</text:span><text:span text:style-name="T291">&lt;dt&gt;&lt;/dt&gt;</text:span><text:span text:style-name="T292"><text:s/>para criar um item da lista</text:span></text:p>
      <text:p text:style-name="Standard"><text:span text:style-name="T293"><text:tab/></text:span><text:span text:style-name="T294">-</text:span><text:span text:style-name="T295">&lt;dd&gt;&lt;/dd&gt;</text:span><text:span text:style-name="T296"><text:s/>para colocar a descrição do item</text:span></text:p>
      <text:p text:style-name="P297"/>
      <text:p text:style-name="P298"/>
      <text:p text:style-name="Standard"><text:span text:style-name="T299">●</text:span><text:span text:style-name="T300">TABELA HTML:</text:span></text:p>
      <text:p text:style-name="P301"/>
      <text:p text:style-name="Standard"><text:span text:style-name="T302"><text:tab/>-</text:span><text:span text:style-name="T303">&lt;table&gt;&lt;/table&gt;</text:span><text:span text:style-name="T304"><text:s/>para criar uma tabela</text:span></text:p>
      <text:p text:style-name="Standard"><text:span text:style-name="T305"><text:tab/></text:span><text:span text:style-name="T306">-</text:span><text:span text:style-name="T307">&lt;tr&gt;&lt;/tr&gt;</text:span><text:span text:style-name="T308"><text:s/>para criar uma linha da tabela</text:span></text:p>
      <text:p text:style-name="Standard"><text:span text:style-name="T309"><text:tab/></text:span><text:span text:style-name="T310">-</text:span><text:span text:style-name="T311">&lt;th&gt;&lt;/th&gt; ou &lt;td&gt;&lt;/td&gt;</text:span><text:span text:style-name="T312"><text:s/>para criar elementos na tabela</text:span></text:p>
      <text:p text:style-name="Standard"><text:span text:style-name="T313"><text:tab/></text:span><text:span text:style-name="T314">-</text:span><text:span text:style-name="T315">border</text:span><text:span text:style-name="T316"><text:s/>para criar uma borda</text:span></text:p>
      <text:p text:style-name="Standard"><text:span text:style-name="T317"><text:tab/>-</text:span><text:span text:style-name="T318">border-collapse: collapse;</text:span><text:span text:style-name="T319"><text:s/>para que as bordas se juntem</text:span></text:p>
      <text:p text:style-name="Standard"><text:span text:style-name="T320"><text:tab/></text:span><text:span text:style-name="T321">-</text:span><text:span text:style-name="T322">colspan="2"</text:span><text:span text:style-name="T323"><text:s/>atributo para uma</text:span><text:span text:style-name="T324"><text:s/>célula abranger 2 colunas</text:span></text:p>
      <text:p text:style-name="Standard"><text:span text:style-name="T325"><text:tab/></text:span><text:span text:style-name="T326">-</text:span><text:span text:style-name="T327">rowspan="2"</text:span><text:span text:style-name="T328"><text:s/>atributo para uma célula abranger mais de uma linha</text:span></text:p>
      <text:p text:style-name="Standard"><text:span text:style-name="T329">●</text:span><text:span text:style-name="T330">Símbolos e emojis</text:span></text:p>
      <text:p text:style-name="P331"/>
      <text:p text:style-name="Standard"><text:span text:style-name="T332"><text:tab/></text:span><text:span text:style-name="T333">-Para colocar emojis no seu site, você deve verificar o código do emoji no site:<text:s/></text:span><text:a xlink:href="https://emojipedia.org/" office:target-frame-name="_top" xlink:show="replace"><text:span text:style-name="T334">https://emojipedia.org/</text:span></text:a></text:p>
      <text:p text:style-name="P335"/>
      <text:p text:style-name="Standard"><text:span text:style-name="T336"><text:tab/></text:span><text:span text:style-name="T337">-Antes de colocar o código do emoji, você deve adicionar os seguintes caracteres:<text:s/></text:span><text:span text:style-name="T338">&amp;#x</text:span></text:p>
      <text:p text:style-name="P339"/>
      <text:p text:style-name="P340"><text:span text:style-name="T341"><text:tab/></text:span><text:span text:style-name="T342">-Para adicionar símbolos você pode pesquisar o código daquele símbolo nesse site:<text:s/></text:span><text:span text:style-name="T343">www.w3schools.com/charsets/ref_utf_symbols.asp</text:span></text:p>
      <text:p text:style-name="P344"/>
      <text:p text:style-name="P345"/>
      <text:p text:style-name="Standard"><text:span text:style-name="T346">●</text:span><text:span text:style-name="T347">Imagens</text:span></text:p>
      <text:p text:style-name="P348"/>
      <text:list text:style-name="LFO1" text:continue-numbering="true">
        <text:list-item>
          <text:list>
            <text:list-item>
              <text:p text:style-name="P349">JPEG:</text:p>
              <text:list text:continue-numbering="true">
                <text:list-item>
                  <text:p text:style-name="P350">não permite transparência</text:p>
                </text:list-item>
                <text:list-item>
                  <text:p text:style-name="P351">não permite animação</text:p>
                </text:list-item>
                <text:list-item>
                  <text:p text:style-name="P352">leve</text:p>
                </text:list-item>
                <text:list-item>
                  <text:p text:style-name="P353">pior qualidade</text:p>
                </text:list-item>
              </text:list>
            </text:list-item>
          </text:list>
        </text:list-item>
      </text:list>
      <text:p text:style-name="P354"/>
      <text:list text:style-name="LFO2" text:continue-numbering="true">
        <text:list-item>
          <text:list>
            <text:list-item>
              <text:p text:style-name="P355">PNG:</text:p>
              <text:list text:continue-numbering="true">
                <text:list-item>
                  <text:p text:style-name="P356">permite transparência</text:p>
                </text:list-item>
                <text:list-item>
                  <text:p text:style-name="P357">não permite animação</text:p>
                </text:list-item>
                <text:list-item>
                  <text:p text:style-name="P358"><text:span text:style-name="T359">mais pesado</text:span></text:p>
                </text:list-item>
                <text:list-item>
                  <text:p text:style-name="P360">melhor qualidade</text:p>
                </text:list-item>
              </text:list>
            </text:list-item>
          </text:list>
        </text:list-item>
      </text:list>
      <text:p text:style-name="P361"/>
      <text:p text:style-name="P362"><text:tab/><text:tab/></text:p>
      <text:p text:style-name="Standard"><text:span text:style-name="T363">●Favicon</text:span></text:p>
      <text:p text:style-name="P364"><text:tab/></text:p>
      <text:p text:style-name="P365"><text:tab/>-A imagem do favicon deve ser salvada como:</text:p>
      <text:p text:style-name="P366"><text:tab/><text:tab/>.ico (padrão)</text:p>
      <text:p text:style-name="P367"><text:tab/><text:tab/>.png</text:p>
      <text:p text:style-name="P368"><text:tab/><text:tab/>.svg (melhor, mas<text:s/>não é compatível com todos os navegadores)</text:p>
      <text:p text:style-name="P369"/>
      <text:p text:style-name="Standard"><text:span text:style-name="T370"><text:tab/></text:span><text:span text:style-name="T371">-</text:span><text:span text:style-name="T372">Crie um link de favicon no header e coloque a imagem nele, para mudar o favicon da sua página</text:span></text:p>
      <text:p text:style-name="P373"/>
      <text:p text:style-name="P374"/>
      <text:p text:style-name="P375">●Imagens dinâmicas</text:p>
      <text:p text:style-name="P376"/>
      <text:p text:style-name="Standard"><text:span text:style-name="T377"><text:tab/>-</text:span><text:span text:style-name="T378">Crie as imagens de diferentes tamanhos, para se adaptarem de acordo com o tamanho do<text:s/></text:span><text:span text:style-name="T379">dispositivo. EX:</text:span></text:p>
      <text:p text:style-name="Standard"><text:span text:style-name="T380"><text:tab/></text:span><text:span text:style-name="T381">img-p.png 300x300</text:span></text:p>
      <text:p text:style-name="P382"><text:tab/>img-m.png 700x700</text:p>
      <text:p text:style-name="P383"><text:tab/>img-g.png 1000x1000</text:p>
      <text:p text:style-name="P384"/>
      <text:p text:style-name="Standard"><text:span text:style-name="T385"><text:tab/></text:span><text:span text:style-name="T386">-</text:span><text:span text:style-name="T387">Crie uma tag<text:s/></text:span><text:span text:style-name="T388">&lt;picture&gt;&lt;/picture&gt;<text:s/></text:span><text:span text:style-name="T389">e coloque a img maior dentro dela.</text:span></text:p>
      <text:p text:style-name="P390"><text:tab/></text:p>
      <text:p text:style-name="P391"><text:span text:style-name="T392">-</text:span><text:span text:style-name="T393">Depois crie algumas tags<text:s/></text:span><text:span text:style-name="T394">source:media-type</text:span><text:span text:style-name="T395"><text:s/>dependendo de quantas imagens você tem, sempre coloque<text:s/></text:span><text:span text:style-name="T396">esses sources antes da imagem principal</text:span></text:p>
      <text:p text:style-name="P397"/>
      <text:p text:style-name="P398"><text:span text:style-name="T399">-</text:span><text:span text:style-name="T400">Mude o<text:s/></text:span><text:span text:style-name="T401">min-width<text:s/></text:span><text:span text:style-name="T402">para<text:s/></text:span><text:span text:style-name="T403">max-width</text:span><text:span text:style-name="T404"><text:s/>e coloque o máximo de width que a página pode ter antes de mudar de foto</text:span></text:p>
      <text:p text:style-name="P405"/>
      <text:p text:style-name="P406"/>
      <text:soft-page-break/>
      <text:p text:style-name="Standard"><text:span text:style-name="T407">●</text:span><text:span text:style-name="T408">Áudios</text:span></text:p>
      <text:p text:style-name="P409"/>
      <text:p text:style-name="Standard"><text:span text:style-name="T410"><text:tab/>-</text:span><text:span text:style-name="T411">Formatos de áudio aceitos:<text:s/></text:span><text:span text:style-name="T412">MP3, OGG, WAV<text:s/></text:span><text:span text:style-name="T413">(use nessa ordem)</text:span></text:p>
      <text:p text:style-name="P414"/>
      <text:p text:style-name="Standard"><text:span text:style-name="T415"><text:tab/></text:span><text:span text:style-name="T416">-</text:span><text:span text:style-name="T417">Crie uma tag<text:s/></text:span><text:span text:style-name="T418">&lt;audio&gt;<text:s/></text:span><text:span text:style-name="T419">e crie uma<text:s/></text:span><text:span text:style-name="T420">tag<text:s/></text:span><text:span text:style-name="T421">source:src</text:span><text:span text:style-name="T422"><text:s/>dentro dela</text:span></text:p>
      <text:p text:style-name="P423"/>
      <text:p text:style-name="Standard"><text:span text:style-name="T424"><text:tab/></text:span><text:span text:style-name="T425">-</text:span><text:span text:style-name="T426">Dentro do<text:s/></text:span><text:span text:style-name="T427">src</text:span><text:span text:style-name="T428"><text:s/>coloque o local do arquivo e no<text:s/></text:span><text:span text:style-name="T429">type</text:span><text:span text:style-name="T430"><text:s/>coloque o tipo do arquivo, que você pode verificar nesse link (obs.<text:s/></text:span><text:span text:style-name="T431">mp3 = mpeg</text:span><text:span text:style-name="T432">):<text:s/></text:span><text:a xlink:href="https://www.iana.org/assignments/media-types/media-types.xhtml" office:target-frame-name="_top" xlink:show="replace"><text:span text:style-name="T433">https://www.iana.org/assignments/media-types/media-types.xhtml</text:span></text:a></text:p>
      <text:p text:style-name="P434"/>
      <text:p text:style-name="Standard"><text:span text:style-name="T435"><text:tab/></text:span><text:span text:style-name="T436">-</text:span><text:span text:style-name="T437">Adicione também alguns parâmetros na tag<text:s/></text:span><text:span text:style-name="T438">áudio</text:span><text:span text:style-name="T439"><text:s/>como:</text:span></text:p>
      <text:p text:style-name="P440">Controls</text:p>
      <text:p text:style-name="P441">Autoplay</text:p>
      <text:p text:style-name="P442">Preload=“metadata“</text:p>
      <text:p text:style-name="P443">Loop</text:p>
      <text:p text:style-name="P444"/>
      <text:p text:style-name="P445">●Cores</text:p>
      <text:p text:style-name="P446"/>
      <text:p text:style-name="Standard"><text:span text:style-name="T447"><text:tab/></text:span><text:span text:style-name="T448">­</text:span><text:span text:style-name="T449">-</text:span><text:span text:style-name="T450">As cores podem ser representadas de 3 formas diferentes.</text:span></text:p>
      <text:p text:style-name="P451"/>
      <text:p text:style-name="Standard"><text:span text:style-name="T452"><text:tab/></text:span><text:span text:style-name="T453"><draw:frame draw:style-name="a0" draw:name="Gráfico 1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54"><text:s/>Hexadecimal: o código<text:s/></text:span><text:span text:style-name="T455">hexadecimal</text:span><text:span text:style-name="T456"><text:s/>tem 16 dígitos.</text:span></text:p>
      <text:p text:style-name="P457">0 1 2 3 4 5 6 7 8 9 A B C D E F</text:p>
      <text:p text:style-name="P458"/>
      <text:p text:style-name="Standard"><text:span text:style-name="T459"><text:tab/></text:span><text:span text:style-name="T460"><draw:frame draw:style-name="a1" draw:name="Gráfico 2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61"><text:s/></text:span><text:span text:style-name="T462">RGB: Cada letra significa uma cor:<text:s/></text:span><text:span text:style-name="T463">Red</text:span><text:span text:style-name="T464">,<text:s/></text:span><text:span text:style-name="T465">Green</text:span><text:span text:style-name="T466">,<text:s/></text:span><text:span text:style-name="T467">Blue</text:span><text:span text:style-name="T468">. Então você deve escrever um valor de 0 a 255 para<text:s/></text:span><text:span text:style-name="T469">cada uma dessas cores</text:span></text:p>
      <text:p text:style-name="P470"/>
      <text:p text:style-name="Standard"><text:span text:style-name="T471"><text:tab/></text:span><text:span text:style-name="T472"><draw:frame draw:style-name="a2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73"><text:s/>HSL: hue, saturation, luminosity.</text:span></text:p>
      <text:p text:style-name="P474"/>
      <text:p text:style-name="Standard"><text:span text:style-name="T475">-</text:span><text:span text:style-name="T476">Paleta de cores:</text:span></text:p>
      <text:p text:style-name="Standard"><text:span text:style-name="T477"><text:tab/></text:span></text:p>
      <text:p text:style-name="Standard"><text:span text:style-name="T478"><text:tab/></text:span><text:span text:style-name="T479">-</text:span><text:span text:style-name="T480">Use sempre de 3 a 5 cores na paleta de cores do seu site</text:span></text:p>
      <text:p text:style-name="P481"/>
      <text:soft-page-break/>
      <text:p text:style-name="P482"><text:span text:style-name="T483"><draw:frame draw:style-name="a3" draw:name="Picture 4" text:anchor-type="as-char" svg:x="0in" svg:y="0in" svg:width="2.16233in" svg:height="1.3433in" style:rel-width="scale" style:rel-height="scale"><draw:image xlink:href="media/image2.jpeg" xlink:type="simple" xlink:show="embed" xlink:actuate="onLoad"/><svg:title/><svg:desc>Chart, sunburst chart

Description automatically generated</svg:desc></draw:frame></text:span></text:p>
      <text:p text:style-name="P484"/>
      <text:p text:style-name="Standard"><text:span text:style-name="T485">-</text:span><text:span text:style-name="T486">Cores complementares:</text:span></text:p>
      <text:p text:style-name="Standard"><text:span text:style-name="T487"><text:tab/></text:span></text:p>
      <text:p text:style-name="Standard"><text:span text:style-name="T488"><text:tab/></text:span><text:span text:style-name="T489">-</text:span><text:span text:style-name="T490"><text:s/>Cores complementares são aquelas que tem mais contraste entre si, elas sempre<text:s/></text:span><text:span text:style-name="T491">ficam de lados opostos do círculo cromático. EX: (</text:span><text:span text:style-name="T492">amarelo<text:s/></text:span><text:span text:style-name="T493">+<text:s/></text:span><text:span text:style-name="T494">roxo</text:span><text:span text:style-name="T495">), (</text:span><text:span text:style-name="T496">vermelho<text:s/></text:span><text:span text:style-name="T497">+<text:s/></text:span><text:span text:style-name="T498">verde</text:span><text:span text:style-name="T499">), (azul +)</text:span></text:p>
      <text:p text:style-name="P500"/>
      <text:p text:style-name="Standard"><text:span text:style-name="T501">-</text:span><text:span text:style-name="T502">Cores análogas:</text:span></text:p>
      <text:p text:style-name="Standard"><text:span text:style-name="T503"><text:tab/></text:span></text:p>
      <text:p text:style-name="Standard"><text:span text:style-name="T504"><text:tab/></text:span><text:span text:style-name="T505">-</text:span><text:span text:style-name="T506">São aquelas que não tem tanto contraste, mas combinam bastante entre si, sempre ficam imediatamente do lado uma da outra formada por 3 cor</text:span><text:span text:style-name="T507">es. EX: (</text:span><text:span text:style-name="T508">azul<text:s/></text:span><text:span text:style-name="T509">+<text:s/></text:span><text:span text:style-name="T510">azul-esverdeado<text:s/></text:span><text:span text:style-name="T511">+<text:s/></text:span><text:span text:style-name="T512">verde</text:span><text:span text:style-name="T513">)</text:span></text:p>
      <text:p text:style-name="P514"/>
      <text:p text:style-name="Standard"><text:span text:style-name="T515">-</text:span><text:span text:style-name="T516">Cores análogas mais uma complementar:</text:span></text:p>
      <text:p text:style-name="P517"/>
      <text:p text:style-name="Standard"><text:span text:style-name="T518"><text:tab/></text:span><text:span text:style-name="T519">-</text:span><text:span text:style-name="T520">Quando você tem cores análogas, mas para quebrar um pouco a semelhança, usa uma cor que se destaca bem</text:span></text:p>
      <text:p text:style-name="P521"/>
      <text:p text:style-name="Standard"><text:span text:style-name="T522">-</text:span><text:span text:style-name="T523">Cores análogas relacionadas</text:span></text:p>
      <text:p text:style-name="P524"/>
      <text:p text:style-name="Standard"><text:span text:style-name="T525"><text:tab/></text:span><text:span text:style-name="T526">-</text:span><text:span text:style-name="T527">Quando você usa duas cores<text:s/></text:span><text:span text:style-name="T528">análogas, e escolhe a terceira pulando uma casa. EX: (</text:span><text:span text:style-name="T529">amarelo</text:span><text:span text:style-name="T530"><text:s/></text:span><text:span text:style-name="T531">+<text:s/></text:span><text:span text:style-name="T532">amarelo-alaranjado</text:span><text:span text:style-name="T533"><text:s/>+<text:s/></text:span><text:span text:style-name="T534">vermelho-alaranjado</text:span><text:span text:style-name="T535">) dando a impressão de um degradê</text:span></text:p>
      <text:p text:style-name="P536"/>
      <text:p text:style-name="Standard"><text:span text:style-name="T537">-</text:span><text:span text:style-name="T538">Cores intercaladas</text:span></text:p>
      <text:p text:style-name="P539"/>
      <text:p text:style-name="Standard"><text:span text:style-name="T540"><text:tab/></text:span><text:span text:style-name="T541">-</text:span><text:span text:style-name="T542">Quando você escolhe uma cor principal e pula de uma em uma. EX: (</text:span><text:span text:style-name="T543">amarelo</text:span><text:span text:style-name="T544"><text:s/></text:span><text:span text:style-name="T545">+<text:s/></text:span><text:span text:style-name="T546">laranja<text:s/></text:span><text:span text:style-name="T547">+<text:s/></text:span><text:span text:style-name="T548">vermelho</text:span><text:span text:style-name="T549">)</text:span></text:p>
      <text:p text:style-name="P550"/>
      <text:p text:style-name="Standard"><text:span text:style-name="T551"><text:tab/>-</text:span><text:span text:style-name="T552">Nas cores intercaladas, você pode pular quantas cores você quiser, não necessariamente deve ser apenas 1.</text:span></text:p>
      <text:p text:style-name="P553"/>
      <text:p text:style-name="Standard"><text:span text:style-name="T554">-</text:span><text:span text:style-name="T555">Degradê</text:span></text:p>
      <text:p text:style-name="P556"/>
      <text:p text:style-name="Standard"><text:span text:style-name="T557"><text:tab/></text:span><text:span text:style-name="T558"><text:tab/></text:span><text:span text:style-name="T559">-</text:span><text:span text:style-name="T560">Para formar um degradê, normalmente você escolhe uma cor e modifica a saturação e luminosidade dela usando o termo HSL<text:s/></text:span><text:span text:style-name="T561">como já foi mostrado mais acima. Utilizando assim, a monocromia</text:span></text:p>
      <text:p text:style-name="P562"/>
      <text:p text:style-name="P563"/>
      <text:p text:style-name="Standard"><text:span text:style-name="T564">●Tipografia:</text:span></text:p>
      <text:p text:style-name="P565"/>
      <text:p text:style-name="Standard"><text:span text:style-name="T566"><text:tab/></text:span><text:span text:style-name="T567">-</text:span><text:span text:style-name="T568">Anatomia do tipo:</text:span></text:p>
      <text:p text:style-name="P569"><text:tab/><text:tab/></text:p>
      <text:p text:style-name="Standard"><text:span text:style-name="T570"><text:tab/></text:span><text:span text:style-name="T571"><text:tab/></text:span><text:span text:style-name="T572"><draw:frame draw:style-name="a4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73"><text:s/>Altura-x: altura determinada pelo<text:s/></text:span><text:span text:style-name="T574">x</text:span><text:span text:style-name="T575"><text:s/>minúsculo de cada fonte, todas as outras letras minúsculas seguem esse padrão de tamanho</text:span></text:p>
      <text:p text:style-name="P576"/>
      <text:p text:style-name="Standard"><text:span text:style-name="T577"><text:tab/></text:span><text:span text:style-name="T578"><text:tab/></text:span><text:span text:style-name="T579"><draw:frame draw:style-name="a5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0"><text:s/>Altura das<text:s/></text:span><text:span text:style-name="T581">maiúsculas: altura das letras maiúsculas, em algumas fontes, os vazamentos também alcançam esse tamanho</text:span></text:p>
      <text:p text:style-name="P582"/>
      <text:p text:style-name="Standard"><text:span text:style-name="T583"><text:tab/></text:span><text:span text:style-name="T584"><text:tab/></text:span><text:span text:style-name="T585"><draw:frame draw:style-name="a6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6"><text:s/>Ascendente: algumas letras minúsculas têm uma parte vazada para cima, como o<text:s/></text:span><text:span text:style-name="T587">b, d, k<text:s/></text:span><text:span text:style-name="T588">etc.</text:span></text:p>
      <text:p text:style-name="P589"/>
      <text:p text:style-name="Standard"><text:span text:style-name="T590"><text:tab/></text:span><text:span text:style-name="T591"><text:tab/></text:span><text:span text:style-name="T592"><draw:frame draw:style-name="a7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93"><text:s/>Descendente: são parecidos com as ascendentes, mas s</text:span><text:span text:style-name="T594">ão vazadas para baixo.</text:span></text:p>
      <text:p text:style-name="P595"/>
      <text:p text:style-name="Standard"><text:span text:style-name="T596"><text:tab/></text:span><text:span text:style-name="T597"><text:tab/></text:span><text:span text:style-name="T598"><draw:frame draw:style-name="a8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99"><text:s/>Corpo: soma de todas as alturas no geral</text:span></text:p>
      <text:p text:style-name="P600"/>
      <text:p text:style-name="Standard"><text:span text:style-name="T601">-</text:span><text:span text:style-name="T602">Itens anatômicos:</text:span></text:p>
      <text:p text:style-name="P603"/>
      <text:soft-page-break/>
      <text:p text:style-name="Standard"><text:span text:style-name="T604"><text:tab/></text:span><text:span text:style-name="T605"><text:tab/></text:span><text:span text:style-name="T606"><draw:frame draw:style-name="a9" draw:name="Picture 11" text:anchor-type="as-char" svg:x="0in" svg:y="0in" svg:width="4.76108in" svg:height="2.81289in" style:rel-width="scale" style:rel-height="scale"><draw:image xlink:href="media/image3.png" xlink:type="simple" xlink:show="embed" xlink:actuate="onLoad"/><svg:title/><svg:desc/></draw:frame></text:span></text:p>
      <text:p text:style-name="P607"/>
      <text:p text:style-name="Standard"><text:span text:style-name="T608">A</text:span><text:span text:style-name="T609"><text:s/>-<text:s/></text:span><text:span text:style-name="T610">Altura das maiúsculas</text:span><text:span text:style-name="T611">: Altura que as letras maiúsculas vão ocupar. Geralmente um pouco menor que a soma da ascendente com a mediana (&lt; B + D)</text:span></text:p>
      <text:p text:style-name="Standard"><text:span text:style-name="T612">B</text:span><text:span text:style-name="T613"><text:s/>-<text:s/></text:span><text:span text:style-name="T614">Ascendente</text:span><text:span text:style-name="T615">: Parte das letras maiúsculas que se ergue acima da linha mediana<text:s/></text:span></text:p>
      <text:p text:style-name="Standard"><text:span text:style-name="T616">C</text:span><text:span text:style-name="T617"><text:s/>-<text:s/></text:span><text:span text:style-name="T618">Descendente</text:span><text:span text:style-name="T619">: Parte das letras minúsculas que passa por baixo da linha de base.<text:s/></text:span></text:p>
      <text:p text:style-name="Standard"><text:span text:style-name="T620">D</text:span><text:span text:style-name="T621"><text:s/>-<text:s/></text:span><text:span text:style-name="T622">Altura-X</text:span><text:span text:style-name="T623">: Também chamada de mediana, define o tamanho das letras minúsculas. Tem esse nome,</text:span><text:span text:style-name="T624"><text:s/>pois se baseia no tamanho da letra x minúscula.<text:s/></text:span></text:p>
      <text:p text:style-name="Standard"><text:span text:style-name="T625">E</text:span><text:span text:style-name="T626"><text:s/>-<text:s/></text:span><text:span text:style-name="T627">Corpo</text:span><text:span text:style-name="T628">: É a soma de quatro medidas: ascendente + altura-x + descendente + espaço de reserva. É o tamanho total da letra. É o valor que escolhemos ao configurar o tamanho da fonte em um texto.<text:s/></text:span></text:p>
      <text:p text:style-name="Standard"><text:span text:style-name="T629">1</text:span><text:span text:style-name="T630"><text:s/>-<text:s/></text:span><text:span text:style-name="T631">Arco</text:span><text:span text:style-name="T632">:<text:s/></text:span><text:span text:style-name="T633">presente em letras minúsculas. Uma linha curva que nasce em na haste principal.<text:s/></text:span></text:p>
      <text:p text:style-name="Standard"><text:span text:style-name="T634">2</text:span><text:span text:style-name="T635"><text:s/>-<text:s/></text:span><text:span text:style-name="T636">Barriga</text:span><text:span text:style-name="T637">: curva em uma letra maiúscula ou minúscula, fechada, ligada à haste vertical em dois pontos.<text:s/></text:span></text:p>
      <text:p text:style-name="Standard"><text:span text:style-name="T638">3</text:span><text:span text:style-name="T639"><text:s/>-<text:s/></text:span><text:span text:style-name="T640">Braço</text:span><text:span text:style-name="T641">: traço horizontal ou inclinado, ligado à haste vertical pri</text:span><text:span text:style-name="T642">ncipal de uma letra maiúscula ou minúscula.<text:s/></text:span></text:p>
      <text:p text:style-name="Standard"><text:span text:style-name="T643">4</text:span><text:span text:style-name="T644"><text:s/>-<text:s/></text:span><text:span text:style-name="T645">Cauda</text:span><text:span text:style-name="T646">: apêndice do corpo de algumas letras (g, j, J, K, Q, R), que fica abaixo da linha base.<text:s/></text:span></text:p>
      <text:p text:style-name="Standard"><text:span text:style-name="T647">5</text:span><text:span text:style-name="T648"><text:s/>-<text:s/></text:span><text:span text:style-name="T649">Enlace</text:span><text:span text:style-name="T650">: a forma como uma haste, linha ou filete se liga a um arremate, a uma serifa ou a um<text:s/></text:span><text:span text:style-name="T651">terminal. Pode ser angular ou curvilíneo.<text:s/></text:span></text:p>
      <text:p text:style-name="Standard"><text:span text:style-name="T652">6</text:span><text:span text:style-name="T653"><text:s/>-<text:s/></text:span><text:span text:style-name="T654">Espinha</text:span><text:span text:style-name="T655">: curva e contracurva estrutural da letra S.</text:span></text:p>
      <text:p text:style-name="Standard"><text:span text:style-name="T656">7</text:span><text:span text:style-name="T657"><text:s/>-<text:s/></text:span><text:span text:style-name="T658">Esporão</text:span><text:span text:style-name="T659">: uma projeção que encontramos nas letras b e G.</text:span></text:p>
      <text:p text:style-name="Standard"><text:span text:style-name="T660">8</text:span><text:span text:style-name="T661"><text:s/>-<text:s/></text:span><text:span text:style-name="T662">Filete</text:span><text:span text:style-name="T663">: haste horizontal ou inclinada, fechada nas duas extremidades, por duas hastes ou por<text:s/></text:span><text:span text:style-name="T664">uma curva.<text:s/></text:span></text:p>
      <text:p text:style-name="Standard"><text:span text:style-name="T665">9</text:span><text:span text:style-name="T666"><text:s/>-<text:s/></text:span><text:span text:style-name="T667">Haste</text:span><text:span text:style-name="T668">: traço principal de uma letra, geralmente vertical.<text:s/></text:span></text:p>
      <text:p text:style-name="Standard"><text:span text:style-name="T669">10</text:span><text:span text:style-name="T670"><text:s/>-<text:s/></text:span><text:span text:style-name="T671">Olho</text:span><text:span text:style-name="T672">: espaço em branco, fechado, dentro de uma letra.<text:s/></text:span></text:p>
      <text:p text:style-name="Standard"><text:span text:style-name="T673">11</text:span><text:span text:style-name="T674"><text:s/>-<text:s/></text:span><text:span text:style-name="T675">Orelha</text:span><text:span text:style-name="T676">: apêndice presente na letra g, que pode ser em gota, botão, bandeira ou gancho.<text:s/></text:span></text:p>
      <text:p text:style-name="Standard"><text:span text:style-name="T677">12</text:span><text:span text:style-name="T678"><text:s/>-<text:s/></text:span><text:span text:style-name="T679">Pé</text:span><text:span text:style-name="T680">: terminal ou serifa<text:s/></text:span><text:span text:style-name="T681">horizontal que arremata uma perna na parte de baixo.<text:s/></text:span></text:p>
      <text:p text:style-name="Standard"><text:span text:style-name="T682">13</text:span><text:span text:style-name="T683"><text:s/>-<text:s/></text:span><text:span text:style-name="T684">Perna</text:span><text:span text:style-name="T685">: haste vertical ou inclinada com um extremidade livre (ou com um pé) e outra extremidade ligada ao corpo da letra.<text:s/></text:span></text:p>
      <text:p text:style-name="Standard"><text:span text:style-name="T686">14</text:span><text:span text:style-name="T687"><text:s/>-<text:s/></text:span><text:span text:style-name="T688">Serifa</text:span><text:span text:style-name="T689">: também chamada de apoio ou patilha. Pequenas retas que ornamen</text:span><text:span text:style-name="T690">tam as hastes de alguns tipos.<text:s/></text:span></text:p>
      <text:soft-page-break/>
      <text:p text:style-name="Standard"><text:span text:style-name="T691">15</text:span><text:span text:style-name="T692"><text:s/>-<text:s/></text:span><text:span text:style-name="T693">Terminal</text:span><text:span text:style-name="T694">: forma que arremata a extremidade de uma linha curva de uma letra.<text:s/></text:span></text:p>
      <text:p text:style-name="Standard"><text:span text:style-name="T695">16</text:span><text:span text:style-name="T696"><text:s/>-<text:s/></text:span><text:span text:style-name="T697">Vértice</text:span><text:span text:style-name="T698">: também chamada de ápice. Formada pela convergência de duas hastes que se encontram. Pode ser pontiagudo, oblíquo, plano ou redon</text:span><text:span text:style-name="T699">do.</text:span></text:p>
      <text:p text:style-name="P700"/>
      <text:p text:style-name="P701"/>
      <text:p text:style-name="Standard"><text:span text:style-name="T702">-</text:span><text:span text:style-name="T703">Clifos, caracteres ou letras: são as letras do alfabeto</text:span></text:p>
      <text:p text:style-name="P704"/>
      <text:p text:style-name="Standard"><text:span text:style-name="T705">-</text:span><text:span text:style-name="T706">Famílias tipograficas: são letras da mesma fonte, porem um pouco diferentes, por exemplo,<text:s/></text:span></text:p>
      <text:p text:style-name="Standard"><text:span text:style-name="T707"><text:tab/></text:span><text:span text:style-name="T708"><text:tab/>-<text:s/></text:span><text:span text:style-name="T709">open sans light</text:span></text:p>
      <text:p text:style-name="Standard"><text:span text:style-name="T710"><text:tab/></text:span><text:span text:style-name="T711"><text:tab/>-<text:s/></text:span><text:span text:style-name="T712">open sans normal</text:span></text:p>
      <text:p text:style-name="Standard"><text:span text:style-name="T713"><text:tab/></text:span><text:span text:style-name="T714"><text:tab/>-<text:s/></text:span><text:span text:style-name="T715">open sans semibold</text:span></text:p>
      <text:p text:style-name="Standard"><text:span text:style-name="T716"><text:tab/></text:span><text:span text:style-name="T717"><text:tab/>-<text:s/></text:span><text:span text:style-name="T718">open sans bold</text:span></text:p>
      <text:p text:style-name="P719"/>
      <text:p text:style-name="Standard"><text:span text:style-name="T720">-</text:span><text:span text:style-name="T721">Categorias de Fontes:</text:span></text:p>
      <text:p text:style-name="P722"/>
      <text:p text:style-name="P723"><text:tab/>-serifadas: tem serifa</text:p>
      <text:p text:style-name="P724"><text:tab/>-sans-serif: traduzindo do francês, “sem serifa“</text:p>
      <text:p text:style-name="P725"><text:tab/>-monoespaçada: tem todas as letras da mesma largura</text:p>
      <text:p text:style-name="P726"><text:tab/>-handwriting: escritas à mão</text:p>
      <text:p text:style-name="P727"><text:tab/>-display/comemorativas: não seguem nenhuma regra, são usadas normalmente para textos curtos, como nome de filmes</text:p>
      <text:p text:style-name="P728"/>
      <text:p text:style-name="P729">●Fontes:</text:p>
      <text:p text:style-name="P730"/>
      <text:p text:style-name="Standard"><text:span text:style-name="T731"><text:tab/></text:span><text:span text:style-name="T732">-</text:span><text:span text:style-name="T733">Tamanhos:</text:span></text:p>
      <text:p text:style-name="P734"><text:tab/><text:tab/></text:p>
      <text:p text:style-name="Standard"><text:span text:style-name="T735"><text:tab/></text:span><text:span text:style-name="T736"><text:tab/></text:span><text:span text:style-name="T737"><draw:frame draw:style-name="a10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38"><text:s/>Medidas absolutas:</text:span></text:p>
      <text:p text:style-name="P739"><text:tab/></text:p>
      <text:p text:style-name="P740"><text:tab/><text:tab/><text:tab/>- cm (centímetro)</text:p>
      <text:p text:style-name="P741"><text:tab/><text:tab/><text:tab/>- mm (milímetro)</text:p>
      <text:p text:style-name="P742"><text:tab/><text:tab/><text:tab/>- in (polegada)</text:p>
      <text:p text:style-name="Standard"><text:span text:style-name="T743"><text:tab/></text:span><text:span text:style-name="T744"><text:tab/></text:span><text:span text:style-name="T745"><text:tab/>- px (pixel)</text:span></text:p>
      <text:p text:style-name="Standard"><text:span text:style-name="T746"><text:tab/></text:span><text:span text:style-name="T747"><text:tab/></text:span><text:span text:style-name="T748"><text:tab/>- pt (ponto)</text:span></text:p>
      <text:soft-page-break/>
      <text:p text:style-name="Standard"><text:span text:style-name="T749"><text:tab/></text:span><text:span text:style-name="T750"><text:tab/></text:span><text:span text:style-name="T751"><text:tab/>- pc (paica)</text:span></text:p>
      <text:p text:style-name="P752"/>
      <text:p text:style-name="Standard"><text:span text:style-name="T753"><text:tab/></text:span><text:span text:style-name="T754"><text:tab/></text:span><text:span text:style-name="T755"><draw:frame draw:style-name="a11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56"><text:s/>Medidas relativas:</text:span></text:p>
      <text:p text:style-name="P757"/>
      <text:p text:style-name="P758"><text:tab/><text:tab/><text:tab/>- em (tamanho m)</text:p>
      <text:p text:style-name="Standard"><text:span text:style-name="T759"><text:tab/></text:span><text:span text:style-name="T760"><text:tab/></text:span><text:span text:style-name="T761"><text:tab/>- ex<text:s/></text:span><text:span text:style-name="T762">(tamanho x)</text:span></text:p>
      <text:p text:style-name="Standard"><text:span text:style-name="T763"><text:tab/></text:span><text:span text:style-name="T764"><text:tab/></text:span><text:span text:style-name="T765"><text:tab/>- rem (tamanho m do body)</text:span></text:p>
      <text:p text:style-name="Standard"><text:span text:style-name="T766"><text:tab/></text:span><text:span text:style-name="T767"><text:tab/></text:span><text:span text:style-name="T768"><text:tab/></text:span><text:span text:style-name="T769">- vw (view width)</text:span></text:p>
      <text:p text:style-name="P770"><text:tab/><text:tab/><text:tab/>- vh (view height)</text:p>
      <text:p text:style-name="Standard"><text:span text:style-name="T771"><text:tab/></text:span><text:span text:style-name="T772"><text:tab/></text:span><text:span text:style-name="T773"><text:tab/></text:span><text:span text:style-name="T774">- % (porcentagem)</text:span></text:p>
      <text:p text:style-name="P775"/>
      <text:p text:style-name="Standard"><text:span text:style-name="T776"><text:tab/></text:span><text:span text:style-name="T777">-<text:s/></text:span><text:span text:style-name="T778">font-weight:</text:span></text:p>
      <text:p text:style-name="P779"><text:tab/></text:p>
      <text:p text:style-name="P780"><text:span text:style-name="T781"><text:tab/></text:span><text:span text:style-name="T782"><text:tab/></text:span><text:span text:style-name="T783"><draw:frame draw:style-name="a12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784"><text:s/></text:span><text:span text:style-name="T785">Pode-se usar os tamanhos com palavras-chave. EX:<text:s/></text:span><text:span text:style-name="T786">lighter, normal, bold, bolder</text:span></text:p>
      <text:p text:style-name="P787"/>
      <text:p text:style-name="P788"><text:span text:style-name="T789"><text:tab/></text:span><text:span text:style-name="T790"><text:tab/></text:span><text:span text:style-name="T791"><draw:frame draw:style-name="a13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792"><text:s/></text:span><text:span text:style-name="T793">Também pode se usar variações com<text:s/></text:span><text:span text:style-name="T794">números. EX:<text:s/></text:span><text:span text:style-name="T795">100, 200, 300, 400, 500, 600, 700, 800, 900</text:span></text:p>
      <text:p text:style-name="P796"/>
      <text:p text:style-name="P797"><text:span text:style-name="T798"><text:tab/></text:span><text:span text:style-name="T799"><text:tab/></text:span><text:span text:style-name="T800">●nem todas as fontes têm todos esses pesos</text:span></text:p>
      <text:p text:style-name="P801"/>
      <text:p text:style-name="P802"><text:span text:style-name="T803"><text:tab/></text:span><text:span text:style-name="T804">-</text:span><text:span text:style-name="T805"><text:s/>shorthand font:</text:span></text:p>
      <text:p text:style-name="P806"/>
      <text:p text:style-name="P807"><text:tab/><text:tab/><text:span text:style-name="T808">font style<text:s/></text:span><text:span text:style-name="T809">-&gt;<text:s/></text:span><text:span text:style-name="T810">font weight<text:s/></text:span><text:span text:style-name="T811">-&gt;<text:s/></text:span><text:span text:style-name="T812">font size<text:s/></text:span><text:span text:style-name="T813">-&gt;<text:s/></text:span><text:span text:style-name="T814">font family</text:span></text:p>
      <text:p text:style-name="P815"/>
      <text:p text:style-name="P816"><text:tab/><text:tab/>EX: font: italic bold 2em Arial, sans-serif;</text:p>
      <text:p text:style-name="P817"/>
      <text:p text:style-name="P818"/>
      <text:p text:style-name="P819"/>
      <text:p text:style-name="P820">●Pseudoclasses / Pseudoelementos</text:p>
      <text:p text:style-name="P821"/>
      <text:p text:style-name="Standard"><text:span text:style-name="T822"><text:tab/>-<text:s/></text:span><text:span text:style-name="T823">Pseudo classes usa “</text:span><text:span text:style-name="T824">:”</text:span></text:p>
      <text:p text:style-name="Standard"><text:span text:style-name="T825"><text:tab/></text:span><text:span text:style-name="T826">-<text:s/></text:span><text:span text:style-name="T827">Pseudo elementos usa “</text:span><text:span text:style-name="T828">::</text:span><text:span text:style-name="T829">”</text:span></text:p>
      <text:p text:style-name="P830"/>
      <text:p text:style-name="Standard"/>
      <text:p text:style-name="P831">●Background</text:p>
      <text:p text:style-name="P832"/>
      <text:soft-page-break/>
      <text:p text:style-name="Standard"><text:span text:style-name="T833"><text:tab/></text:span><text:span text:style-name="T834">Background-image:<text:s/></text:span></text:p>
      <text:p text:style-name="Standard"><text:span text:style-name="T835"><text:tab/></text:span><text:span text:style-name="T836"><text:tab/></text:span><text:span text:style-name="T837">- url(‘imagens/wallpaper001.jpg’);<text:s/></text:span><text:span text:style-name="T838">ou um link</text:span></text:p>
      <text:p text:style-name="Standard"><text:span text:style-name="T839"><text:tab/></text:span><text:span text:style-name="T840"><text:tab/></text:span><text:span text:style-name="T841">- linear-grdient (to bottom, yellow, red);</text:span></text:p>
      <text:p text:style-name="P842"/>
      <text:p text:style-name="P843"><text:tab/>background-size: 100px 200px;</text:p>
      <text:p text:style-name="Standard"><text:span text:style-name="T844"><text:tab/></text:span><text:span text:style-name="T845"><text:tab/>-<text:s/></text:span><text:span text:style-name="T846">pode usar tbm contain e cover</text:span></text:p>
      <text:p text:style-name="Standard"><text:span text:style-name="T847"><text:tab/></text:span><text:span text:style-name="T848"><text:tab/></text:span><text:span text:style-name="T849">- contain não sei pra que serve</text:span></text:p>
      <text:p text:style-name="Standard"><text:span text:style-name="T850"><text:tab/></text:span><text:span text:style-name="T851"><text:tab/></text:span><text:span text:style-name="T852">- cover cobre tudo</text:span></text:p>
      <text:p text:style-name="P853"/>
      <text:p text:style-name="Standard"><text:span text:style-name="T854"><text:tab/>background-repeat:<text:s/></text:span></text:p>
      <text:p text:style-name="P855"><text:tab/><text:tab/>- no-repeat</text:p>
      <text:p text:style-name="P856"><text:tab/><text:s/><text:tab/>- repeat-x / repeat-y</text:p>
      <text:p text:style-name="P857"/>
      <text:p text:style-name="Standard"><text:span text:style-name="T858"><text:tab/></text:span><text:span text:style-name="T859">background-position:</text:span></text:p>
      <text:p text:style-name="Standard"><text:span text:style-name="T860"><text:tab/></text:span><text:span text:style-name="T861"><text:tab/>primeiro você declara o x e depois o y.</text:span></text:p>
      <text:p text:style-name="Standard"><text:span text:style-name="T862"><text:tab/></text:span><text:span text:style-name="T863"><text:tab/></text:span><text:span text:style-name="T864">ex: left center / center top / right<text:s/></text:span><text:span text:style-name="T865">bottom…</text:span></text:p>
      <text:p text:style-name="Standard"><text:span text:style-name="T866"><text:tab/></text:span><text:span text:style-name="T867"><text:tab/></text:span><text:span text:style-name="T868">- funciona com px e %</text:span></text:p>
      <text:p text:style-name="Standard"><text:span text:style-name="T869"><text:tab/></text:span><text:span text:style-name="T870"><text:tab/>- se não funcionar tenta declarar um height: 100vh<text:s/></text:span><text:span text:style-name="T871"><text:tab/></text:span><text:span text:style-name="T872"><text:tab/>no body</text:span></text:p>
      <text:p text:style-name="P873"/>
      <text:p text:style-name="Standard"><text:span text:style-name="T874"><text:tab/></text:span><text:span text:style-name="T875">background-attachment:</text:span></text:p>
      <text:p text:style-name="Standard"><text:span text:style-name="T876"><text:tab/></text:span><text:span text:style-name="T877"><text:tab/></text:span><text:span text:style-name="T878">- pode usar fixed e scroll</text:span></text:p>
      <text:p text:style-name="Standard"><text:span text:style-name="T879"><text:tab/></text:span><text:span text:style-name="T880"><text:tab/></text:span><text:span text:style-name="T881">- fixed: fica fixo e só o conteúdo mexe</text:span></text:p>
      <text:p text:style-name="Standard"><text:span text:style-name="T882"><text:tab/></text:span><text:span text:style-name="T883"><text:tab/></text:span><text:span text:style-name="T884">- scroll: move com o conteúdo</text:span></text:p>
      <text:p text:style-name="P885"/>
      <text:p text:style-name="P886"><text:tab/>Shorthand background:</text:p>
      <text:p text:style-name="P887"><text:tab/></text:p>
      <text:p text:style-name="Standard"><text:span text:style-name="T888"><text:tab/></text:span><text:span text:style-name="T889"><text:tab/></text:span><text:span text:style-name="T890">Color</text:span><text:span text:style-name="T891"><text:s/>&gt; image &gt; position &gt; repeat &gt; [size] &gt; attachment</text:span></text:p>
      <text:p text:style-name="P892"/>
      <text:p text:style-name="Standard"><text:span text:style-name="T893"><text:tab/></text:span><text:span text:style-name="T894"><text:tab/></text:span><text:span text:style-name="T895">-size está na regra, mas tem que ser usado separado por enquanto, então se não funcionar tire o size e coloque separado</text:span></text:p>
      <text:p text:style-name="P896"/>
      <text:p text:style-name="P897"/>
      <text:p text:style-name="Standard"/>
      <text:p text:style-name="P898">●TABELAS:</text:p>
      <text:p text:style-name="P899"/>
      <text:p text:style-name="Standard"><text:span text:style-name="T900"><text:tab/></text:span><text:span text:style-name="T901">b</text:span><text:span text:style-name="T902">order-collapse:<text:s/></text:span><text:span text:style-name="T903">collapse;</text:span></text:p>
      <text:p text:style-name="P904"/>
      <text:p text:style-name="P905"><text:tab/><text:tab/>*para as bordas ficarem juntas*</text:p>
      <text:p text:style-name="P906"/>
      <text:p text:style-name="P907"><text:tab/>border-collapse: separate;</text:p>
      <text:p text:style-name="P908"/>
      <text:p text:style-name="P909"><text:tab/><text:tab/></text:p>
      <text:p text:style-name="P9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MS Minch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A - Roberto Flaquer Moura</dc:creator>
    <meta:creation-date>2009-04-16T11:32:00Z</meta:creation-date>
    <dc:date>2022-05-11T19:17:00Z</dc:date>
    <meta:template xlink:href="Normal" xlink:type="simple"/>
    <meta:editing-cycles>71</meta:editing-cycles>
    <meta:editing-duration>PT280260S</meta:editing-duration>
    <meta:user-defined meta:name="Info 1"/>
    <meta:user-defined meta:name="Info 2"/>
    <meta:user-defined meta:name="Info 3"/>
    <meta:user-defined meta:name="Info 4"/>
    <meta:document-statistic meta:page-count="14" meta:paragraph-count="26" meta:word-count="2057" meta:character-count="13141" meta:row-count="92" meta:non-whitespace-character-count="11110"/>
  </office:meta>
</office:document-meta>
</file>